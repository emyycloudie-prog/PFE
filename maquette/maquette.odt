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www.figma.com/design/NZewAXfo7CJCP7OubA3lO0/Untitled?node-id=0-1&amp;t=FmTUUIpnJPgfHEZT-1" office:target-frame-name="_top" xlink:show="replace"><text:span text:style-name="Hyperlink">https://www.figma.com/design/NZewAXfo7CJCP7OubA3lO0/Untitled?node-id=0-1&amp;t=FmTUUIpnJPgfHEZT-1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licode</meta:initial-creator>
    <dc:creator>Solicode</dc:creator>
    <meta:creation-date>2026-06-04T09:37:00Z</meta:creation-date>
    <dc:date>2026-06-04T09:39:00Z</dc:date>
    <meta:template xlink:href="Normal.dotm" xlink:type="simple"/>
    <meta:editing-cycles>1</meta:editing-cycles>
    <meta:editing-duration>PT120S</meta:editing-duration>
    <meta:document-statistic meta:page-count="1" meta:paragraph-count="1" meta:word-count="31" meta:character-count="202" meta:row-count="1" meta:non-whitespace-character-count="172"/>
  </office:meta>
</office:document-meta>
</file>